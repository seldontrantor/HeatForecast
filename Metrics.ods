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27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652in"/>
    </style:style>
    <style:style style:name="ro1" style:family="table-row">
      <style:table-row-properties style:row-height="0.4835in" fo:break-before="auto" style:use-optimal-row-height="true"/>
    </style:style>
    <style:style style:name="ro2" style:family="table-row">
      <style:table-row-properties style:row-height="2.038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7272in" fo:break-before="auto" style:use-optimal-row-height="true"/>
    </style:style>
    <style:style style:name="ro5" style:family="table-row">
      <style:table-row-properties style:row-height="0.794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639in" fo:break-before="auto" style:use-optimal-row-height="true"/>
    </style:style>
    <style:style style:name="ro11" style:family="table-row">
      <style:table-row-properties style:row-height="0.328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724in" svg:height="5.1894in" svg:x="16.0504in" svg:y="0.0087in">
            <draw:object draw:notify-on-update-of-ranges="Sheet1.A2:Sheet1.A15 Sheet1.M1:Sheet1.M1 Sheet1.M2:Sheet1.M15 Sheet1.N1:Sheet1.N1 Sheet1.N2:Sheet1.N15 Sheet1.O1:Sheet1.O1 Sheet1.O2:Sheet1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3587in" svg:height="5.4083in" svg:x="15.2961in" svg:y="7.6531in">
            <draw:object draw:notify-on-update-of-ranges="Sheet1.A2:Sheet1.A15 Sheet1.Q1:Sheet1.Q1 Sheet1.Q2:Sheet1.Q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n_supplementary_features</text:p>
          </table:table-cell>
          <table:table-cell office:value-type="string" calcext:value-type="string">
            <text:p>window len</text:p>
          </table:table-cell>
          <table:table-cell office:value-type="string" calcext:value-type="string">
            <text:p>pred len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ormalize all features</text:p>
          </table:table-cell>
          <table:table-cell office:value-type="string" calcext:value-type="string">
            <text:p>mse val</text:p>
          </table:table-cell>
          <table:table-cell office:value-type="string" calcext:value-type="string">
            <text:p>mae val</text:p>
          </table:table-cell>
          <table:table-cell office:value-type="string" calcext:value-type="string">
            <text:p>rmee val</text:p>
          </table:table-cell>
          <table:table-cell office:value-type="string" calcext:value-type="string">
            <text:p>R2 val</text:p>
          </table:table-cell>
          <table:table-cell office:value-type="string" calcext:value-type="string">
            <text:p>mse test with 1 batch</text:p>
          </table:table-cell>
          <table:table-cell office:value-type="string" calcext:value-type="string">
            <text:p>mae test with 1 batch</text:p>
          </table:table-cell>
          <table:table-cell office:value-type="string" calcext:value-type="string">
            <text:p>rmee test with 1 batch</text:p>
          </table:table-cell>
          <table:table-cell office:value-type="string" calcext:value-type="string">
            <text:p>MAPE test with 1 batch</text:p>
          </table:table-cell>
          <table:table-cell office:value-type="string" calcext:value-type="string">
            <text:p>R2 tes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e 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05-Feb-2024-11-51-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2327411" calcext:value-type="float">
            <text:p>0.002327411</text:p>
          </table:table-cell>
          <table:table-cell office:value-type="float" office:value="0.0333858281" calcext:value-type="float">
            <text:p>0.0333858281</text:p>
          </table:table-cell>
          <table:table-cell office:value-type="float" office:value="0.04824325" calcext:value-type="float">
            <text:p>0.04824325</text:p>
          </table:table-cell>
          <table:table-cell office:value-type="float" office:value="0.93" calcext:value-type="float">
            <text:p>0.93</text:p>
          </table:table-cell>
          <table:table-cell office:value-type="float" office:value="0.00233365" calcext:value-type="float">
            <text:p>0.00233365</text:p>
          </table:table-cell>
          <table:table-cell office:value-type="float" office:value="0.03457884" calcext:value-type="float">
            <text:p>0.03457884</text:p>
          </table:table-cell>
          <table:table-cell office:value-type="float" office:value="0.048307809" calcext:value-type="float">
            <text:p>0.048307809</text:p>
          </table:table-cell>
          <table:table-cell office:value-type="float" office:value="0" calcext:value-type="float">
            <text:p>0</text:p>
          </table:table-cell>
          <table:table-cell office:value-type="float" office:value="0.9232" calcext:value-type="float">
            <text:p>0.9232</text:p>
          </table:table-cell>
          <table:table-cell office:value-type="string" calcext:value-type="string">
            <text:p>['Demand', 'Temp', 'solar', 'wind', 'humid', 'sin_hour', 'cos_hour']</text:p>
            <text:p>       'sin_doy', 'cos_doy', 'sin_month', 'cos_month', 'sin_woy', 'cos_woy']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05-Feb-2024-13-59-5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*4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375971" calcext:value-type="float">
            <text:p>0.00375971</text:p>
          </table:table-cell>
          <table:table-cell office:value-type="float" office:value="0.04333221" calcext:value-type="float">
            <text:p>0.04333221</text:p>
          </table:table-cell>
          <table:table-cell office:value-type="float" office:value="0.06131656" calcext:value-type="float">
            <text:p>0.06131656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3503543" calcext:value-type="float">
            <text:p>0.003503543</text:p>
          </table:table-cell>
          <table:table-cell office:value-type="float" office:value="0.040919519" calcext:value-type="float">
            <text:p>0.040919519</text:p>
          </table:table-cell>
          <table:table-cell office:value-type="float" office:value="0.05919075" calcext:value-type="float">
            <text:p>0.05919075</text:p>
          </table:table-cell>
          <table:table-cell office:value-type="float" office:value="0" calcext:value-type="float">
            <text:p>0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ame as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05-Feb-2024-14-38-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*1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357332" calcext:value-type="float">
            <text:p>0.00357332</text:p>
          </table:table-cell>
          <table:table-cell office:value-type="float" office:value="0.04571084" calcext:value-type="float">
            <text:p>0.04571084</text:p>
          </table:table-cell>
          <table:table-cell office:value-type="float" office:value="0.059777326" calcext:value-type="float">
            <text:p>0.05977732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3138765" calcext:value-type="float">
            <text:p>0.003138765</text:p>
          </table:table-cell>
          <table:table-cell office:value-type="float" office:value="0.042068447" calcext:value-type="float">
            <text:p>0.042068447</text:p>
          </table:table-cell>
          <table:table-cell office:value-type="float" office:value="0.0560246519" calcext:value-type="float">
            <text:p>0.0560246519</text:p>
          </table:table-cell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ame as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05-Feb-2024-15-04-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2043582" calcext:value-type="float">
            <text:p>0.002043582</text:p>
          </table:table-cell>
          <table:table-cell office:value-type="float" office:value="0.032880451" calcext:value-type="float">
            <text:p>0.032880451</text:p>
          </table:table-cell>
          <table:table-cell office:value-type="float" office:value="0.045206006" calcext:value-type="float">
            <text:p>0.04520600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02846547" calcext:value-type="float">
            <text:p>0.02846547</text:p>
          </table:table-cell>
          <table:table-cell office:value-type="float" office:value="0.038843404" calcext:value-type="float">
            <text:p>0.038843404</text:p>
          </table:table-cell>
          <table:table-cell office:value-type="float" office:value="0" calcext:value-type="float">
            <text:p>0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ame as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05-Feb-2024-15-26-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*3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290922" calcext:value-type="float">
            <text:p>0.00290922</text:p>
          </table:table-cell>
          <table:table-cell office:value-type="float" office:value="0.037985388" calcext:value-type="float">
            <text:p>0.037985388</text:p>
          </table:table-cell>
          <table:table-cell office:value-type="float" office:value="0.053937211" calcext:value-type="float">
            <text:p>0.053937211</text:p>
          </table:table-cell>
          <table:table-cell office:value-type="float" office:value="0.92" calcext:value-type="float">
            <text:p>0.92</text:p>
          </table:table-cell>
          <table:table-cell office:value-type="float" office:value="0.0025656949" calcext:value-type="float">
            <text:p>0.0025656949</text:p>
          </table:table-cell>
          <table:table-cell office:value-type="float" office:value="0.03597608208" calcext:value-type="float">
            <text:p>0.03597608208</text:p>
          </table:table-cell>
          <table:table-cell office:value-type="float" office:value="0.050652541" calcext:value-type="float">
            <text:p>0.050652541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same as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05-Feb-2024-16-05-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3251809" calcext:value-type="float">
            <text:p>0.003251809</text:p>
          </table:table-cell>
          <table:table-cell office:value-type="float" office:value="0.042806956" calcext:value-type="float">
            <text:p>0.042806956</text:p>
          </table:table-cell>
          <table:table-cell office:value-type="float" office:value="0.0570246502" calcext:value-type="float">
            <text:p>0.0570246502</text:p>
          </table:table-cell>
          <table:table-cell office:value-type="float" office:value="0.91" calcext:value-type="float">
            <text:p>0.91</text:p>
          </table:table-cell>
          <table:table-cell office:value-type="float" office:value="0.00324121" calcext:value-type="float">
            <text:p>0.00324121</text:p>
          </table:table-cell>
          <table:table-cell office:value-type="float" office:value="0.04334959" calcext:value-type="float">
            <text:p>0.04334959</text:p>
          </table:table-cell>
          <table:table-cell office:value-type="float" office:value="0.0569317042" calcext:value-type="float">
            <text:p>0.0569317042</text:p>
          </table:table-cell>
          <table:table-cell office:value-type="float" office:value="0" calcext:value-type="float">
            <text:p>0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['Demand', 'Temp', 'solar', 'wind', 'humid', 'sin_doy', 'cos_doy',</text:p>
            <text:p>       'sin_month', 'cos_month', 'sin_woy', 'cos_woy']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05-Feb-2024-17-01-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161548" calcext:value-type="float">
            <text:p>0.00161548</text:p>
          </table:table-cell>
          <table:table-cell office:value-type="float" office:value="0.03119011" calcext:value-type="float">
            <text:p>0.03119011</text:p>
          </table:table-cell>
          <table:table-cell office:value-type="float" office:value="0.040193069" calcext:value-type="float">
            <text:p>0.040193069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148734287" calcext:value-type="float">
            <text:p>0.00148734287</text:p>
          </table:table-cell>
          <table:table-cell office:value-type="float" office:value="0.030370984" calcext:value-type="float">
            <text:p>0.030370984</text:p>
          </table:table-cell>
          <table:table-cell office:value-type="float" office:value="0.03856606" calcext:value-type="float">
            <text:p>0.03856606</text:p>
          </table:table-cell>
          <table:table-cell office:value-type="float" office:value="19.86" calcext:value-type="float">
            <text:p>19.8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<text:s/>'Demand', 'Temp', 'weekend', 'sin_hour', 'cos_hour']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06-Feb-2024-10-18-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12362321" calcext:value-type="float">
            <text:p>0.0012362321</text:p>
          </table:table-cell>
          <table:table-cell office:value-type="float" office:value="0.0266284234" calcext:value-type="float">
            <text:p>0.0266284234</text:p>
          </table:table-cell>
          <table:table-cell office:value-type="float" office:value="0.0351600907" calcext:value-type="float">
            <text:p>0.03516009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12479693" calcext:value-type="float">
            <text:p>0.0012479693</text:p>
          </table:table-cell>
          <table:table-cell office:value-type="float" office:value="0.026920629" calcext:value-type="float">
            <text:p>0.026920629</text:p>
          </table:table-cell>
          <table:table-cell office:value-type="float" office:value="0.035326685" calcext:value-type="float">
            <text:p>0.035326685</text:p>
          </table:table-cell>
          <table:table-cell office:value-type="float" office:value="15.16" calcext:value-type="float">
            <text:p>15.16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ame as 8</text:p>
          </table:table-cell>
          <table:table-cell table:number-columns-repeated="1006"/>
        </table:table-row>
        <table:table-row table:style-name="ro6">
          <table:table-cell table:style-name="ce4" office:value-type="string" calcext:value-type="string">
            <text:p>06-Feb-2024-10-51-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184099" calcext:value-type="float">
            <text:p>0.00184099</text:p>
          </table:table-cell>
          <table:table-cell office:value-type="float" office:value="0.031684212" calcext:value-type="float">
            <text:p>0.031684212</text:p>
          </table:table-cell>
          <table:table-cell office:value-type="float" office:value="0.0429067909" calcext:value-type="float">
            <text:p>0.0429067909</text:p>
          </table:table-cell>
          <table:table-cell office:value-type="float" office:value="0.95" calcext:value-type="float">
            <text:p>0.95</text:p>
          </table:table-cell>
          <table:table-cell office:value-type="float" office:value="0.00151135562" calcext:value-type="float">
            <text:p>0.00151135562</text:p>
          </table:table-cell>
          <table:table-cell office:value-type="float" office:value="0.0289284363" calcext:value-type="float">
            <text:p>0.0289284363</text:p>
          </table:table-cell>
          <table:table-cell office:value-type="float" office:value="0.03887612" calcext:value-type="float">
            <text:p>0.03887612</text:p>
          </table:table-cell>
          <table:table-cell office:value-type="float" office:value="15.31" calcext:value-type="float">
            <text:p>15.3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/>'Demand', <text:s/>'weekend', 'sin_hour', 'cos_hour']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06-Feb-2024-12-4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06808613" calcext:value-type="float">
            <text:p>0.0006808613</text:p>
          </table:table-cell>
          <table:table-cell office:value-type="float" office:value="0.0199296437" calcext:value-type="float">
            <text:p>0.0199296437</text:p>
          </table:table-cell>
          <table:table-cell office:value-type="float" office:value="0.026093324" calcext:value-type="float">
            <text:p>0.026093324</text:p>
          </table:table-cell>
          <table:table-cell office:value-type="float" office:value="0.98" calcext:value-type="float">
            <text:p>0.98</text:p>
          </table:table-cell>
          <table:table-cell office:value-type="float" office:value="0.0007019817" calcext:value-type="float">
            <text:p>0.0007019817</text:p>
          </table:table-cell>
          <table:table-cell office:value-type="float" office:value="0.0202092695" calcext:value-type="float">
            <text:p>0.0202092695</text:p>
          </table:table-cell>
          <table:table-cell office:value-type="float" office:value="0.026494944" calcext:value-type="float">
            <text:p>0.026494944</text:p>
          </table:table-cell>
          <table:table-cell office:value-type="float" office:value="11.007" calcext:value-type="float">
            <text:p>11.007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['Demand', 'Temp', 'solar', 'weekend', 'sin_hour', 'cos_hour']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06-Feb-2024-13-44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0787664" calcext:value-type="float">
            <text:p>0.000787664</text:p>
          </table:table-cell>
          <table:table-cell office:value-type="float" office:value="0.022326933" calcext:value-type="float">
            <text:p>0.022326933</text:p>
          </table:table-cell>
          <table:table-cell office:value-type="float" office:value="0.028065375" calcext:value-type="float">
            <text:p>0.02806537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0761324" calcext:value-type="float">
            <text:p>0.000761324</text:p>
          </table:table-cell>
          <table:table-cell office:value-type="float" office:value="0.021645091" calcext:value-type="float">
            <text:p>0.021645091</text:p>
          </table:table-cell>
          <table:table-cell office:value-type="float" office:value="0.027592118" calcext:value-type="float">
            <text:p>0.027592118</text:p>
          </table:table-cell>
          <table:table-cell office:value-type="float" office:value="13.489" calcext:value-type="float">
            <text:p>13.489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['Demand', 'Temp', 'solar', 'sin_hour', 'cos_hour']</text:p>
          </table:table-cell>
          <table:table-cell table:number-columns-repeated="1006"/>
        </table:table-row>
        <table:table-row table:style-name="ro9">
          <table:table-cell table:style-name="ce4" office:value-type="string" calcext:value-type="string">
            <text:p>07-Feb-2024-16-36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0930103" calcext:value-type="float">
            <text:p>0.000930103</text:p>
          </table:table-cell>
          <table:table-cell office:value-type="float" office:value="0.022894028" calcext:value-type="float">
            <text:p>0.022894028</text:p>
          </table:table-cell>
          <table:table-cell office:value-type="float" office:value="0.03049760311" calcext:value-type="float">
            <text:p>0.0304976031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0910137" calcext:value-type="float">
            <text:p>0.000910137</text:p>
          </table:table-cell>
          <table:table-cell office:value-type="float" office:value="0.0227417014" calcext:value-type="float">
            <text:p>0.0227417014</text:p>
          </table:table-cell>
          <table:table-cell office:value-type="float" office:value="0.0301684699" calcext:value-type="float">
            <text:p>0.0301684699</text:p>
          </table:table-cell>
          <table:table-cell office:value-type="float" office:value="12.609" calcext:value-type="float">
            <text:p>12.60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Simple model of my version</text:p>
            <text:p><text:span text:style-name="T1">Same as 8</text:span> ['Demand', 'Temp', 'weekend', 'sin_hour', 'cos_hour'</text:p>
          </table:table-cell>
          <table:table-cell office:value-type="string" calcext:value-type="string">
            <text:p>didn’t stop at 250th epoch, can go mor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08-Feb-2024-10-20-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T for test</text:p>
          </table:table-cell>
          <table:table-cell office:value-type="string" calcext:value-type="string">
            <text:p>32,32,1</text:p>
          </table:table-cell>
          <table:table-cell office:value-type="string" calcext:value-type="string">
            <text:p>F</text:p>
          </table:table-cell>
          <table:table-cell office:value-type="float" office:value="0.00073027" calcext:value-type="float">
            <text:p>0.00073027</text:p>
          </table:table-cell>
          <table:table-cell office:value-type="float" office:value="0.019534293" calcext:value-type="float">
            <text:p>0.019534293</text:p>
          </table:table-cell>
          <table:table-cell office:value-type="float" office:value="0.027023613" calcext:value-type="float">
            <text:p>0.027023613</text:p>
          </table:table-cell>
          <table:table-cell office:value-type="float" office:value="0.98" calcext:value-type="float">
            <text:p>0.98</text:p>
          </table:table-cell>
          <table:table-cell office:value-type="float" office:value="0.0007442956" calcext:value-type="float">
            <text:p>0.0007442956</text:p>
          </table:table-cell>
          <table:table-cell office:value-type="float" office:value="0.0199684575" calcext:value-type="float">
            <text:p>0.0199684575</text:p>
          </table:table-cell>
          <table:table-cell office:value-type="float" office:value="0.02728176" calcext:value-type="float">
            <text:p>0.02728176</text:p>
          </table:table-cell>
          <table:table-cell office:value-type="float" office:value="10.35" calcext:value-type="float">
            <text:p>10.3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Simple model Aigio</text:p>
            <text:p><text:span text:style-name="T1">Same as 8</text:span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8-Feb-2024-11-16-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10357319" calcext:value-type="float">
            <text:p>0.0010357319</text:p>
          </table:table-cell>
          <table:table-cell office:value-type="float" office:value="0.024691147" calcext:value-type="float">
            <text:p>0.024691147</text:p>
          </table:table-cell>
          <table:table-cell office:value-type="float" office:value="0.032182786" calcext:value-type="float">
            <text:p>0.032182786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10350691" calcext:value-type="float">
            <text:p>0.0010350691</text:p>
          </table:table-cell>
          <table:table-cell office:value-type="float" office:value="0.024800371" calcext:value-type="float">
            <text:p>0.024800371</text:p>
          </table:table-cell>
          <table:table-cell office:value-type="float" office:value="0.03217248" calcext:value-type="float">
            <text:p>0.03217248</text:p>
          </table:table-cell>
          <table:table-cell office:value-type="float" office:value="15.24" calcext:value-type="float">
            <text:p>15.24</text:p>
          </table:table-cell>
          <table:table-cell office:value-type="float" office:value="0.966" calcext:value-type="float">
            <text:p>0.966</text:p>
          </table:table-cell>
          <table:table-cell table:style-name="ce4" office:value-type="string" calcext:value-type="string">
            <text:p>same as 8</text:p>
            <text:p>Dense with 16 16 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08-Feb-2024-13-32-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106909" calcext:value-type="float">
            <text:p>0.00106909</text:p>
          </table:table-cell>
          <table:table-cell office:value-type="float" office:value="0.025315608" calcext:value-type="float">
            <text:p>0.025315608</text:p>
          </table:table-cell>
          <table:table-cell office:value-type="float" office:value="0.0326970368" calcext:value-type="float">
            <text:p>0.0326970368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10943841" calcext:value-type="float">
            <text:p>0.0010943841</text:p>
          </table:table-cell>
          <table:table-cell office:value-type="float" office:value="0.025767276" calcext:value-type="float">
            <text:p>0.025767276</text:p>
          </table:table-cell>
          <table:table-cell office:value-type="float" office:value="0.0330814868" calcext:value-type="float">
            <text:p>0.0330814868</text:p>
          </table:table-cell>
          <table:table-cell office:value-type="float" office:value="15.89" calcext:value-type="float">
            <text:p>15.89</text:p>
          </table:table-cell>
          <table:table-cell office:value-type="float" office:value="0.964" calcext:value-type="float">
            <text:p>0.964</text:p>
          </table:table-cell>
          <table:table-cell table:style-name="ce4" office:value-type="string" calcext:value-type="string">
            <text:p>same as 8</text:p>
            <text:p>My simple model with X as outpu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12-Feb-2024-12-56-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1116689178" calcext:value-type="float">
            <text:p>0.001116689178</text:p>
          </table:table-cell>
          <table:table-cell office:value-type="float" office:value="0.0253226757" calcext:value-type="float">
            <text:p>0.0253226757</text:p>
          </table:table-cell>
          <table:table-cell office:value-type="float" office:value="0.033416893333" calcext:value-type="float">
            <text:p>0.033416893333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1110346" calcext:value-type="float">
            <text:p>0.001110346</text:p>
          </table:table-cell>
          <table:table-cell office:value-type="float" office:value="0.02551845" calcext:value-type="float">
            <text:p>0.02551845</text:p>
          </table:table-cell>
          <table:table-cell office:value-type="float" office:value="0.0333218" calcext:value-type="float">
            <text:p>0.0333218</text:p>
          </table:table-cell>
          <table:table-cell office:value-type="float" office:value="14.49" calcext:value-type="float">
            <text:p>14.49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Same as8</text:p>
            <text:p>With 16 unit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-Feb-2024-13-57-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*2*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, F for test</text:p>
          </table:table-cell>
          <table:table-cell office:value-type="string" calcext:value-type="string">
            <text:p>32,32,32</text:p>
          </table:table-cell>
          <table:table-cell office:value-type="string" calcext:value-type="string">
            <text:p>F</text:p>
          </table:table-cell>
          <table:table-cell office:value-type="float" office:value="0.0009406416" calcext:value-type="float">
            <text:p>0.0009406416</text:p>
          </table:table-cell>
          <table:table-cell office:value-type="float" office:value="0.0230725482" calcext:value-type="float">
            <text:p>0.0230725482</text:p>
          </table:table-cell>
          <table:table-cell office:value-type="float" office:value="0.030669877" calcext:value-type="float">
            <text:p>0.03066987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0950027664" calcext:value-type="float">
            <text:p>0.000950027664</text:p>
          </table:table-cell>
          <table:table-cell office:value-type="float" office:value="0.0234847906" calcext:value-type="float">
            <text:p>0.0234847906</text:p>
          </table:table-cell>
          <table:table-cell office:value-type="float" office:value="0.030822476" calcext:value-type="float">
            <text:p>0.030822476</text:p>
          </table:table-cell>
          <table:table-cell office:value-type="float" office:value="13.35" calcext:value-type="float">
            <text:p>13.35</text:p>
          </table:table-cell>
          <table:table-cell office:value-type="float" office:value="0.969" calcext:value-type="float">
            <text:p>0.969</text:p>
          </table:table-cell>
          <table:table-cell table:style-name="ce4" office:value-type="string" calcext:value-type="string">
            <text:p>same as 8</text:p>
            <text:p>Dense with 32 32 </text:p>
          </table:table-cell>
          <table:table-cell table:number-columns-repeated="1006"/>
        </table:table-row>
        <table:table-row table:style-name="ro12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4:35.555776943</meta:creation-date>
    <dc:date>2024-02-12T15:29:28.042396956</dc:date>
    <meta:editing-duration>PT22H21M10S</meta:editing-duration>
    <meta:editing-cycles>42</meta:editing-cycles>
    <meta:generator>LibreOffice/7.3.7.2$Linux_X86_64 LibreOffice_project/30$Build-2</meta:generator>
    <meta:document-statistic meta:table-count="1" meta:cell-count="3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91cm" svg:height="13.182cm" xlink:href=".." xlink:type="simple" chart:class="chart:bar" chart:style-name="ch1">
        <chart:legend chart:legend-position="end" svg:x="18.623cm" svg:y="5.794cm" style:legend-expansion="high" chart:style-name="ch2"/>
        <chart:plot-area chart:style-name="ch3" table:cell-range-address="Sheet1.A2:Sheet1.A15 Sheet1.M1:Sheet1.O15" chart:data-source-has-labels="both" svg:x="1.658cm" svg:y="0.348cm" svg:width="16.87cm" svg:height="12.63cm">
          <chart:coordinate-region svg:x="3.626cm" svg:y="0.547cm" svg:width="14.902cm" svg:height="9.543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15" chart:label-cell-address="Sheet1.M1:Sheet1.M1" chart:class="chart:bar">
            <chart:data-point chart:repeated="14"/>
          </chart:series>
          <chart:series chart:style-name="ch8" chart:values-cell-range-address="Sheet1.N2:Sheet1.N15" chart:label-cell-address="Sheet1.N1:Sheet1.N1" chart:class="chart:bar">
            <chart:data-point chart:repeated="14"/>
          </chart:series>
          <chart:series chart:style-name="ch9" chart:values-cell-range-address="Sheet1.O2:Sheet1.O15" chart:label-cell-address="Sheet1.O1:Sheet1.O1" chart:class="chart:bar">
            <chart:data-point/>
            <chart:data-point chart:style-name="ch10" chart:repeated="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 test with 1 batch</text:p>
                <draw:g>
                  <svg:desc>Sheet1.M1:Sheet1.M1</svg:desc>
                </draw:g>
              </table:table-cell>
              <table:table-cell office:value-type="string">
                <text:p>mae test with 1 batch</text:p>
                <draw:g>
                  <svg:desc>Sheet1.N1:Sheet1.N1</svg:desc>
                </draw:g>
              </table:table-cell>
              <table:table-cell office:value-type="string">
                <text:p>rmee test with 1 batch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-Feb-2024-11-51-14</text:p>
                <draw:g>
                  <svg:desc>Sheet1.A2:Sheet1.A15</svg:desc>
                </draw:g>
              </table:table-cell>
              <table:table-cell office:value-type="float" office:value="0.00233365">
                <text:p>0.00233365</text:p>
                <draw:g>
                  <svg:desc>Sheet1.M2:Sheet1.M15</svg:desc>
                </draw:g>
              </table:table-cell>
              <table:table-cell office:value-type="float" office:value="0.03457884">
                <text:p>0.03457884</text:p>
                <draw:g>
                  <svg:desc>Sheet1.N2:Sheet1.N15</svg:desc>
                </draw:g>
              </table:table-cell>
              <table:table-cell office:value-type="float" office:value="0.048307809">
                <text:p>0.048307809</text:p>
                <draw:g>
                  <svg:desc>Sheet1.O2:Sheet1.O15</svg:desc>
                </draw:g>
              </table:table-cell>
            </table:table-row>
            <table:table-row>
              <table:table-cell office:value-type="string">
                <text:p>05-Feb-2024-13-59-50</text:p>
              </table:table-cell>
              <table:table-cell office:value-type="float" office:value="0.003503543">
                <text:p>0.003503543</text:p>
              </table:table-cell>
              <table:table-cell office:value-type="float" office:value="0.040919519">
                <text:p>0.040919519</text:p>
              </table:table-cell>
              <table:table-cell office:value-type="float" office:value="0.05919075">
                <text:p>0.05919075</text:p>
              </table:table-cell>
            </table:table-row>
            <table:table-row>
              <table:table-cell office:value-type="string">
                <text:p>05-Feb-2024-14-38-34</text:p>
              </table:table-cell>
              <table:table-cell office:value-type="float" office:value="0.003138765">
                <text:p>0.003138765</text:p>
              </table:table-cell>
              <table:table-cell office:value-type="float" office:value="0.042068447">
                <text:p>0.042068447</text:p>
              </table:table-cell>
              <table:table-cell office:value-type="float" office:value="0.0560246519">
                <text:p>0.0560246519</text:p>
              </table:table-cell>
            </table:table-row>
            <table:table-row>
              <table:table-cell office:value-type="string">
                <text:p>05-Feb-2024-15-04-30</text:p>
              </table:table-cell>
              <table:table-cell office:value-type="float" office:value="0.001508808">
                <text:p>0.001508808</text:p>
              </table:table-cell>
              <table:table-cell office:value-type="float" office:value="0.02846547">
                <text:p>0.02846547</text:p>
              </table:table-cell>
              <table:table-cell office:value-type="float" office:value="0.038843404">
                <text:p>0.038843404</text:p>
              </table:table-cell>
            </table:table-row>
            <table:table-row>
              <table:table-cell office:value-type="string">
                <text:p>05-Feb-2024-15-26-04</text:p>
              </table:table-cell>
              <table:table-cell office:value-type="float" office:value="0.0025656949">
                <text:p>0.0025656949</text:p>
              </table:table-cell>
              <table:table-cell office:value-type="float" office:value="0.03597608208">
                <text:p>0.03597608208</text:p>
              </table:table-cell>
              <table:table-cell office:value-type="float" office:value="0.050652541">
                <text:p>0.050652541</text:p>
              </table:table-cell>
            </table:table-row>
            <table:table-row>
              <table:table-cell office:value-type="string">
                <text:p>05-Feb-2024-16-05-58</text:p>
              </table:table-cell>
              <table:table-cell office:value-type="float" office:value="0.00324121">
                <text:p>0.00324121</text:p>
              </table:table-cell>
              <table:table-cell office:value-type="float" office:value="0.04334959">
                <text:p>0.04334959</text:p>
              </table:table-cell>
              <table:table-cell office:value-type="float" office:value="0.0569317042">
                <text:p>0.0569317042</text:p>
              </table:table-cell>
            </table:table-row>
            <table:table-row>
              <table:table-cell office:value-type="string">
                <text:p>05-Feb-2024-17-01-48</text:p>
              </table:table-cell>
              <table:table-cell office:value-type="float" office:value="0.00148734287">
                <text:p>0.00148734287</text:p>
              </table:table-cell>
              <table:table-cell office:value-type="float" office:value="0.030370984">
                <text:p>0.030370984</text:p>
              </table:table-cell>
              <table:table-cell office:value-type="float" office:value="0.03856606">
                <text:p>0.03856606</text:p>
              </table:table-cell>
            </table:table-row>
            <table:table-row>
              <table:table-cell office:value-type="string">
                <text:p>06-Feb-2024-10-18-14</text:p>
              </table:table-cell>
              <table:table-cell office:value-type="float" office:value="0.0012479693">
                <text:p>0.0012479693</text:p>
              </table:table-cell>
              <table:table-cell office:value-type="float" office:value="0.026920629">
                <text:p>0.026920629</text:p>
              </table:table-cell>
              <table:table-cell office:value-type="float" office:value="0.035326685">
                <text:p>0.035326685</text:p>
              </table:table-cell>
            </table:table-row>
            <table:table-row>
              <table:table-cell office:value-type="string">
                <text:p>06-Feb-2024-10-51-58</text:p>
              </table:table-cell>
              <table:table-cell office:value-type="float" office:value="0.00151135562">
                <text:p>0.00151135562</text:p>
              </table:table-cell>
              <table:table-cell office:value-type="float" office:value="0.0289284363">
                <text:p>0.0289284363</text:p>
              </table:table-cell>
              <table:table-cell office:value-type="float" office:value="0.03887612">
                <text:p>0.03887612</text:p>
              </table:table-cell>
            </table:table-row>
            <table:table-row>
              <table:table-cell office:value-type="string">
                <text:p>06-Feb-2024-12-44-02</text:p>
              </table:table-cell>
              <table:table-cell office:value-type="float" office:value="0.0007019817">
                <text:p>0.0007019817</text:p>
              </table:table-cell>
              <table:table-cell office:value-type="float" office:value="0.0202092695">
                <text:p>0.0202092695</text:p>
              </table:table-cell>
              <table:table-cell office:value-type="float" office:value="0.026494944">
                <text:p>0.026494944</text:p>
              </table:table-cell>
            </table:table-row>
            <table:table-row>
              <table:table-cell office:value-type="string">
                <text:p>06-Feb-2024-13-44-02</text:p>
              </table:table-cell>
              <table:table-cell office:value-type="float" office:value="0.000761324">
                <text:p>0.000761324</text:p>
              </table:table-cell>
              <table:table-cell office:value-type="float" office:value="0.021645091">
                <text:p>0.021645091</text:p>
              </table:table-cell>
              <table:table-cell office:value-type="float" office:value="0.027592118">
                <text:p>0.027592118</text:p>
              </table:table-cell>
            </table:table-row>
            <table:table-row>
              <table:table-cell office:value-type="string">
                <text:p>07-Feb-2024-16-36-32</text:p>
              </table:table-cell>
              <table:table-cell office:value-type="float" office:value="0.000910137">
                <text:p>0.000910137</text:p>
              </table:table-cell>
              <table:table-cell office:value-type="float" office:value="0.0227417014">
                <text:p>0.0227417014</text:p>
              </table:table-cell>
              <table:table-cell office:value-type="float" office:value="0.0301684699">
                <text:p>0.0301684699</text:p>
              </table:table-cell>
            </table:table-row>
            <table:table-row>
              <table:table-cell office:value-type="string">
                <text:p>08-Feb-2024-10-20-19</text:p>
              </table:table-cell>
              <table:table-cell office:value-type="float" office:value="0.0007442956">
                <text:p>0.0007442956</text:p>
              </table:table-cell>
              <table:table-cell office:value-type="float" office:value="0.0199684575">
                <text:p>0.0199684575</text:p>
              </table:table-cell>
              <table:table-cell office:value-type="float" office:value="0.02728176">
                <text:p>0.02728176</text:p>
              </table:table-cell>
            </table:table-row>
            <table:table-row>
              <table:table-cell office:value-type="string">
                <text:p>08-Feb-2024-11-16-46</text:p>
              </table:table-cell>
              <table:table-cell office:value-type="float" office:value="0.0010350691">
                <text:p>0.0010350691</text:p>
              </table:table-cell>
              <table:table-cell office:value-type="float" office:value="0.024800371">
                <text:p>0.024800371</text:p>
              </table:table-cell>
              <table:table-cell office:value-type="float" office:value="0.03217248">
                <text:p>0.03217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72cm" svg:height="13.738cm" xlink:href=".." xlink:type="simple" chart:class="chart:bar" chart:style-name="ch1">
        <chart:legend chart:legend-position="end" svg:x="21.906cm" svg:y="6.57cm" style:legend-expansion="high" chart:style-name="ch2"/>
        <chart:plot-area chart:style-name="ch3" table:cell-range-address="Sheet1.A2:Sheet1.A15 Sheet1.Q1:Sheet1.Q15" chart:data-source-has-labels="both" svg:x="1.981cm" svg:y="0.378cm" svg:width="19.897cm" svg:height="12.535cm">
          <chart:coordinate-region svg:x="3.837cm" svg:y="0.577cm" svg:width="18.041cm" svg:height="9.448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15" chart:label-cell-address="Sheet1.Q1:Sheet1.Q1" chart:class="chart:bar">
            <chart:data-point/>
            <chart:data-point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 test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-Feb-2024-11-51-14</text:p>
                <draw:g>
                  <svg:desc>Sheet1.A2:Sheet1.A15</svg:desc>
                </draw:g>
              </table:table-cell>
              <table:table-cell office:value-type="float" office:value="0.9232">
                <text:p>0.9232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05-Feb-2024-13-59-50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05-Feb-2024-14-38-3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05-Feb-2024-15-04-30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05-Feb-2024-15-26-0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05-Feb-2024-16-05-5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05-Feb-2024-17-01-48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06-Feb-2024-10-18-14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06-Feb-2024-10-51-5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06-Feb-2024-12-44-02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06-Feb-2024-13-44-0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07-Feb-2024-16-36-3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08-Feb-2024-10-20-19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08-Feb-2024-11-16-46</text:p>
              </table:table-cell>
              <table:table-cell office:value-type="float" office:value="0.966">
                <text:p>0.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